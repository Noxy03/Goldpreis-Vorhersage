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Tabelle1" style:family="table">
      <style:table-properties style:width="14.464cm" fo:margin-left="0.009cm" fo:margin-top="0cm" fo:margin-bottom="0cm" table:align="left" style:writing-mode="page"/>
    </style:style>
    <style:style style:name="Tabelle1.A" style:family="table-column">
      <style:table-column-properties style:column-width="2.82cm"/>
    </style:style>
    <style:style style:name="Tabelle1.B" style:family="table-column">
      <style:table-column-properties style:column-width="3.881cm"/>
    </style:style>
    <style:style style:name="Tabelle1.D" style:family="table-column">
      <style:table-column-properties style:column-width="3.882cm"/>
    </style:style>
    <style:style style:name="Tabelle1.1" style:family="table-row">
      <style:table-row-properties fo:keep-together="auto"/>
    </style:style>
    <style:style style:name="Tabelle1.A1" style:family="table-cell">
      <style:table-cell-properties fo:background-color="#e8e2d5" fo:padding-left="0.191cm" fo:padding-right="0.191cm" fo:padding-top="0cm" fo:padding-bottom="0cm" fo:border="0.5pt solid #000000">
        <style:background-image/>
      </style:table-cell-properties>
    </style:style>
    <style:style style:name="Tabelle1.A2" style:family="table-cell">
      <style:table-cell-properties fo:padding-left="0.191cm" fo:padding-right="0.191cm" fo:padding-top="0cm" fo:padding-bottom="0cm" fo:border="0.5pt solid #000000"/>
    </style:style>
    <style:style style:name="Tabelle1.B2" style:family="table-cell">
      <style:table-cell-properties fo:padding-left="0.191cm" fo:padding-right="0.191cm" fo:padding-top="0cm" fo:padding-bottom="0cm" fo:border="0.5pt solid #000000"/>
    </style:style>
    <style:style style:name="Tabelle1.C2" style:family="table-cell">
      <style:table-cell-properties fo:padding-left="0.191cm" fo:padding-right="0.191cm" fo:padding-top="0cm" fo:padding-bottom="0cm" fo:border="0.5pt solid #000000"/>
    </style:style>
    <style:style style:name="Tabelle1.D2" style:family="table-cell">
      <style:table-cell-properties fo:padding-left="0.191cm" fo:padding-right="0.191cm" fo:padding-top="0cm" fo:padding-bottom="0cm" fo:border="0.5pt solid #000000"/>
    </style:style>
    <style:style style:name="Tabelle1.A3" style:family="table-cell">
      <style:table-cell-properties fo:padding-left="0.191cm" fo:padding-right="0.191cm" fo:padding-top="0cm" fo:padding-bottom="0cm" fo:border="0.5pt solid #000000"/>
    </style:style>
    <style:style style:name="Tabelle1.B3" style:family="table-cell">
      <style:table-cell-properties fo:padding-left="0.191cm" fo:padding-right="0.191cm" fo:padding-top="0cm" fo:padding-bottom="0cm" fo:border="0.5pt solid #000000"/>
    </style:style>
    <style:style style:name="Tabelle1.C3" style:family="table-cell">
      <style:table-cell-properties fo:padding-left="0.191cm" fo:padding-right="0.191cm" fo:padding-top="0cm" fo:padding-bottom="0cm" fo:border="0.5pt solid #000000"/>
    </style:style>
    <style:style style:name="Tabelle1.D3" style:family="table-cell">
      <style:table-cell-properties fo:padding-left="0.191cm" fo:padding-right="0.191cm" fo:padding-top="0cm" fo:padding-bottom="0cm" fo:border="0.5pt solid #000000"/>
    </style:style>
    <style:style style:name="Tabelle1.A4" style:family="table-cell">
      <style:table-cell-properties fo:padding-left="0.191cm" fo:padding-right="0.191cm" fo:padding-top="0cm" fo:padding-bottom="0cm" fo:border="0.5pt solid #000000"/>
    </style:style>
    <style:style style:name="Tabelle1.B4" style:family="table-cell">
      <style:table-cell-properties fo:padding-left="0.191cm" fo:padding-right="0.191cm" fo:padding-top="0cm" fo:padding-bottom="0cm" fo:border="0.5pt solid #000000"/>
    </style:style>
    <style:style style:name="Tabelle1.C4" style:family="table-cell">
      <style:table-cell-properties fo:padding-left="0.191cm" fo:padding-right="0.191cm" fo:padding-top="0cm" fo:padding-bottom="0cm" fo:border="0.5pt solid #000000"/>
    </style:style>
    <style:style style:name="Tabelle1.D4" style:family="table-cell">
      <style:table-cell-properties fo:padding-left="0.191cm" fo:padding-right="0.191cm" fo:padding-top="0cm" fo:padding-bottom="0cm" fo:border="0.5pt solid #000000"/>
    </style:style>
    <style:style style:name="Tabelle2" style:family="table">
      <style:table-properties style:width="14.64cm" fo:margin-left="0.009cm" fo:margin-top="0cm" fo:margin-bottom="0cm" table:align="left" style:writing-mode="page"/>
    </style:style>
    <style:style style:name="Tabelle2.A" style:family="table-column">
      <style:table-column-properties style:column-width="2.469cm"/>
    </style:style>
    <style:style style:name="Tabelle2.B" style:family="table-column">
      <style:table-column-properties style:column-width="2.291cm"/>
    </style:style>
    <style:style style:name="Tabelle2.C" style:family="table-column">
      <style:table-column-properties style:column-width="2.293cm"/>
    </style:style>
    <style:style style:name="Tabelle2.D" style:family="table-column">
      <style:table-column-properties style:column-width="2.295cm"/>
    </style:style>
    <style:style style:name="Tabelle2.E" style:family="table-column">
      <style:table-column-properties style:column-width="2.646cm"/>
    </style:style>
    <style:style style:name="Tabelle2.1" style:family="table-row">
      <style:table-row-properties fo:keep-together="auto"/>
    </style:style>
    <style:style style:name="Tabelle2.A1" style:family="table-cell">
      <style:table-cell-properties fo:background-color="#e8e2d5" fo:padding-left="0.191cm" fo:padding-right="0.191cm" fo:padding-top="0cm" fo:padding-bottom="0cm" fo:border="0.5pt solid #000000">
        <style:background-image/>
      </style:table-cell-properties>
    </style:style>
    <style:style style:name="Tabelle2.A2" style:family="table-cell">
      <style:table-cell-properties fo:padding-left="0.191cm" fo:padding-right="0.191cm" fo:padding-top="0cm" fo:padding-bottom="0cm" fo:border="0.5pt solid #000000"/>
    </style:style>
    <style:style style:name="Tabelle2.B2" style:family="table-cell">
      <style:table-cell-properties fo:padding-left="0.191cm" fo:padding-right="0.191cm" fo:padding-top="0cm" fo:padding-bottom="0cm" fo:border="0.5pt solid #000000"/>
    </style:style>
    <style:style style:name="Tabelle2.C2" style:family="table-cell">
      <style:table-cell-properties fo:padding-left="0.191cm" fo:padding-right="0.191cm" fo:padding-top="0cm" fo:padding-bottom="0cm" fo:border="0.5pt solid #000000"/>
    </style:style>
    <style:style style:name="Tabelle2.D2" style:family="table-cell">
      <style:table-cell-properties fo:padding-left="0.191cm" fo:padding-right="0.191cm" fo:padding-top="0cm" fo:padding-bottom="0cm" fo:border="0.5pt solid #000000"/>
    </style:style>
    <style:style style:name="Tabelle2.E2" style:family="table-cell">
      <style:table-cell-properties fo:padding-left="0.191cm" fo:padding-right="0.191cm" fo:padding-top="0cm" fo:padding-bottom="0cm" fo:border="0.5pt solid #000000"/>
    </style:style>
    <style:style style:name="Tabelle2.F2" style:family="table-cell">
      <style:table-cell-properties fo:padding-left="0.191cm" fo:padding-right="0.191cm" fo:padding-top="0cm" fo:padding-bottom="0cm" fo:border="0.5pt solid #000000"/>
    </style:style>
    <style:style style:name="Tabelle2.A3" style:family="table-cell">
      <style:table-cell-properties fo:padding-left="0.191cm" fo:padding-right="0.191cm" fo:padding-top="0cm" fo:padding-bottom="0cm" fo:border="0.5pt solid #000000"/>
    </style:style>
    <style:style style:name="Tabelle2.B3" style:family="table-cell">
      <style:table-cell-properties fo:padding-left="0.191cm" fo:padding-right="0.191cm" fo:padding-top="0cm" fo:padding-bottom="0cm" fo:border="0.5pt solid #000000"/>
    </style:style>
    <style:style style:name="Tabelle2.C3" style:family="table-cell">
      <style:table-cell-properties fo:padding-left="0.191cm" fo:padding-right="0.191cm" fo:padding-top="0cm" fo:padding-bottom="0cm" fo:border="0.5pt solid #000000"/>
    </style:style>
    <style:style style:name="Tabelle2.D3" style:family="table-cell">
      <style:table-cell-properties fo:padding-left="0.191cm" fo:padding-right="0.191cm" fo:padding-top="0cm" fo:padding-bottom="0cm" fo:border="0.5pt solid #000000"/>
    </style:style>
    <style:style style:name="Tabelle2.E3" style:family="table-cell">
      <style:table-cell-properties fo:padding-left="0.191cm" fo:padding-right="0.191cm" fo:padding-top="0cm" fo:padding-bottom="0cm" fo:border="0.5pt solid #000000"/>
    </style:style>
    <style:style style:name="Tabelle2.F3" style:family="table-cell">
      <style:table-cell-properties fo:padding-left="0.191cm" fo:padding-right="0.191cm" fo:padding-top="0cm" fo:padding-bottom="0cm" fo:border="0.5pt solid #000000"/>
    </style:style>
    <style:style style:name="Tabelle2.A4" style:family="table-cell">
      <style:table-cell-properties fo:padding-left="0.191cm" fo:padding-right="0.191cm" fo:padding-top="0cm" fo:padding-bottom="0cm" fo:border="0.5pt solid #000000"/>
    </style:style>
    <style:style style:name="Tabelle2.B4" style:family="table-cell">
      <style:table-cell-properties fo:padding-left="0.191cm" fo:padding-right="0.191cm" fo:padding-top="0cm" fo:padding-bottom="0cm" fo:border="0.5pt solid #000000"/>
    </style:style>
    <style:style style:name="Tabelle2.C4" style:family="table-cell">
      <style:table-cell-properties fo:padding-left="0.191cm" fo:padding-right="0.191cm" fo:padding-top="0cm" fo:padding-bottom="0cm" fo:border="0.5pt solid #000000"/>
    </style:style>
    <style:style style:name="Tabelle2.D4" style:family="table-cell">
      <style:table-cell-properties fo:padding-left="0.191cm" fo:padding-right="0.191cm" fo:padding-top="0cm" fo:padding-bottom="0cm" fo:border="0.5pt solid #000000"/>
    </style:style>
    <style:style style:name="Tabelle2.E4" style:family="table-cell">
      <style:table-cell-properties fo:padding-left="0.191cm" fo:padding-right="0.191cm" fo:padding-top="0cm" fo:padding-bottom="0cm" fo:border="0.5pt solid #000000"/>
    </style:style>
    <style:style style:name="Tabelle2.F4" style:family="table-cell">
      <style:table-cell-properties fo:padding-left="0.191cm" fo:padding-right="0.191cm" fo:padding-top="0cm" fo:padding-bottom="0cm" fo:border="0.5pt solid #000000"/>
    </style:style>
    <style:style style:name="P1" style:family="paragraph" style:parent-style-name="Standard">
      <style:paragraph-properties fo:margin-top="0cm" fo:margin-bottom="0.141cm" style:contextual-spacing="false"/>
      <style:text-properties style:font-name="Calibri" fo:font-size="16pt" fo:font-weight="bold" style:font-name-asian="Calibri1" style:font-size-asian="16pt" style:font-weight-asian="bold" style:font-name-complex="Calibri1" style:font-size-complex="16pt" style:font-weight-complex="bold"/>
    </style:style>
    <style:style style:name="P2" style:family="paragraph" style:parent-style-name="Standard">
      <style:paragraph-properties fo:margin-top="0cm" fo:margin-bottom="0.353cm" style:contextual-spacing="false" fo:line-height="125%"/>
    </style:style>
    <style:style style:name="P3" style:family="paragraph" style:parent-style-name="Heading_20_1">
      <style:paragraph-properties fo:margin-top="0.564cm" fo:margin-bottom="0.282cm" style:contextual-spacing="false"/>
      <style:text-properties style:font-name="Calibri" fo:font-weight="bold" style:font-name-asian="Calibri1" style:font-weight-asian="bold" style:font-name-complex="Calibri1" style:font-weight-complex="bold"/>
    </style:style>
    <style:style style:name="P4" style:family="paragraph" style:parent-style-name="Text_20_body">
      <style:text-properties style:font-name="Calibri" fo:font-size="11pt" officeooo:paragraph-rsid="00100803" style:font-name-asian="Calibri1" style:font-size-asian="11pt" style:font-name-complex="Calibri1" style:font-size-complex="11pt"/>
    </style:style>
    <style:style style:name="P5" style:family="paragraph" style:parent-style-name="Heading_20_1">
      <style:paragraph-properties fo:margin-top="0.564cm" fo:margin-bottom="0.282cm" style:contextual-spacing="false"/>
    </style:style>
    <style:style style:name="P6" style:family="paragraph" style:parent-style-name="Standard">
      <style:text-properties style:font-name="Calibri" fo:font-size="10pt" fo:font-weight="bold" style:font-name-asian="Calibri1" style:font-size-asian="10pt" style:font-weight-asian="bold" style:font-name-complex="Calibri1" style:font-size-complex="10pt" style:font-weight-complex="bold"/>
    </style:style>
    <style:style style:name="P7" style:family="paragraph" style:parent-style-name="Standard">
      <style:text-properties style:font-name="Calibri" fo:font-size="10pt" fo:font-weight="normal" style:font-name-asian="Calibri1" style:font-size-asian="10pt" style:font-weight-asian="normal" style:font-name-complex="Calibri1" style:font-size-complex="10pt" style:font-weight-complex="normal"/>
    </style:style>
    <style:style style:name="P8" style:family="paragraph" style:parent-style-name="Standard">
      <style:paragraph-properties fo:margin-top="0cm" fo:margin-bottom="0.353cm" style:contextual-spacing="false" fo:line-height="125%"/>
      <style:text-properties style:font-name="Calibri" fo:font-size="11pt" style:font-name-asian="Calibri1" style:font-size-asian="11pt" style:font-name-complex="Calibri1" style:font-size-complex="11pt"/>
    </style:style>
    <style:style style:name="T1" style:family="text">
      <style:text-properties style:font-name="Calibri" fo:font-size="11pt" style:font-name-asian="Calibri1" style:font-size-asian="11pt" style:font-name-complex="Calibri1" style:font-size-complex="11pt"/>
    </style:style>
    <style:style style:name="T2" style:family="text">
      <style:text-properties style:font-name="Calibri" fo:font-size="11pt" officeooo:rsid="00100803" style:font-name-asian="Calibri1" style:font-size-asian="11pt" style:font-name-complex="Calibri1" style:font-size-complex="11pt"/>
    </style:style>
    <style:style style:name="T3" style:family="text">
      <style:text-properties officeooo:rsid="00100803"/>
    </style:style>
    <style:style style:name="T4" style:family="text">
      <style:text-properties style:font-name="Calibri" fo:font-weight="bold" style:font-name-asian="Calibri1" style:font-weight-asian="bold" style:font-name-complex="Calibri1" style:font-weight-complex="bold"/>
    </style:style>
    <style:style style:name="T5" style:family="text">
      <style:text-properties style:font-name="Calibri" fo:font-size="11pt" officeooo:rsid="0010989d" style:font-name-asian="Calibri1" style:font-size-asian="11pt" style:font-name-complex="Calibri1" style:font-size-complex="11pt"/>
    </style:style>
    <style:style style:name="T6" style:family="text">
      <style:text-properties style:font-name="Calibri" fo:font-size="11pt" fo:font-weight="bold" style:font-name-asian="Calibri1" style:font-size-asian="11pt" style:font-weight-asian="bold" style:font-name-complex="Calibri1" style:font-size-complex="11pt" style:font-weight-complex="bold"/>
    </style:style>
    <style:style style:name="T7" style:family="text">
      <style:text-properties style:font-name="Calibri" fo:font-size="11pt" fo:font-weight="normal" style:font-name-asian="Calibri1" style:font-size-asian="11pt" style:font-weight-asian="normal" style:font-name-complex="Calibri1" style:font-size-complex="11pt" style:font-weight-complex="normal"/>
    </style:style>
    <style:style style:name="T8" style:family="text">
      <style:text-properties style:font-name="Calibri" fo:font-size="11pt" fo:font-weight="bold" officeooo:rsid="0010989d" style:font-name-asian="Calibri1" style:font-size-asian="11pt" style:font-weight-asian="bold" style:font-name-complex="Calibri1" style:font-size-complex="11pt" style:font-weight-complex="bold"/>
    </style:style>
    <style:style style:name="T9" style:family="text">
      <style:text-properties style:font-name="Calibri" fo:font-size="11pt" fo:font-weight="normal" officeooo:rsid="0010989d" style:font-name-asian="Calibri1" style:font-size-asian="11pt" style:font-weight-asian="normal" style:font-name-complex="Calibri1" style:font-size-complex="11pt" style:font-weight-complex="normal"/>
    </style:style>
    <style:style style:name="T10" style:family="text">
      <style:text-properties style:font-name="Calibri" fo:font-size="11pt" officeooo:rsid="0011cfec" style:font-name-asian="Calibri1" style:font-size-asian="11pt" style:font-name-complex="Calibri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oldpreis-Prognose: Projektbericht Noel Ciborro Fernandez</text:p>
      <text:p text:style-name="P2"><text:span text:style-name="T1">Chronologische Zusammenfassung der Arbeiten an </text:span><text:span text:style-name="T2">dem </text:span><text:span text:style-name="T1">Support Vector Regression. Trainingsbasis war zunächst (Kaggle, 2011–2018 bzw. 2019 über die Yahoo-Finance-API), im späteren Verlauf wurde auf das im Team abgestimmte, vorverarbeitete Format gold_train_pp.csv / gold_test_pp.csv umgestellt.</text:span></text:p>
      <text:p text:style-name="P3">Phase 1: Aufbau der SVR-Pipeline</text:p>
      <text:p text:style-name="P4">Den Ausgangspunkt bildete eine SVR mit RBF-Kernel, eingebettet in eine sklearn-Pipeline aus Simplelmputer, StandardScaler und PCA (n_components=O. 95). Anders als bei den linearen Modellen im Team wurde nicht der absolute Goldpreis als Ziel verwendet, sondern die Preisänderung (target_return = zukünftiger Preis - aktueller Preis), gekapselt über einen TransformedTargetRegressor mit eigenem StandardScaler für die Zielgröße. Nach der Vorhersage wird der aktuelle Preis wieder addiert, um den absoluten Preis zurückzurechnen. Der Grundgedanke: Das Modell soll echte Kursbewegungen lernen, statt lediglich den letzten bekannten Preis zu wiederholen. </text:p>
      <text:p text:style-name="P4">Für alle drei Horizonte (1, 5, 30 Tage) wurde je ein eigenes Modell trainiert (kein rekursiver Ansatz), mit <text:span text:style-name="T3">H</text:span>orizont abhängigem gap in TimeSeriesSplit (n_splits=3, test_size=250, gap=h), damit kein Trainings-Sample am Rand eines Folds ein Ziel besitzt, das in den Validierungsbereich hineinreicht. Die Hyperparameter C, epsilon und gamma wurden per GridSearchCV über den selben TimeSeriesSplit bestimmt. </text:p>
      <text:p text:style-name="P4">Als Lag-Features werden für jede der zwölf Preisspalten drei Vergangenheitswerte verwendet (1, 5 und 30 Handelstage) - ein Kompromiss zwischen kurzfristiger, mittlerer und langfristiger Historie, passend zu den drei Prognosehorizonten, allerdings ohne <text:span text:style-name="T3">H</text:span>orizont spezifische Anpassung.</text:p>
      <text:p text:style-name="P3">Phase 2: Data-Leak-Prüfung und Umstellung auf das Team-Datenformat</text:p>
      <text:p text:style-name="P2"><text:span text:style-name="T1">Die Umstellung auf vorverarbeitete Zielspalten </text:span><text:span text:style-name="T2">(</text:span><text:span text:style-name="T1">Target_Adj_Close, Target_Adj_5d, Target_Adj_30d aus dem gemeinsamen Preprocessing) machte eine erneute Prüfung auf Data Leakage notwendig, da eine falsch zugeordnete oder unvollständig entfernte Zielspalte in den Features </text:span><text:span text:style-name="T2">ein schneller</text:span><text:span text:style-name="T1"> Fehler bei diesem Datensatz ist.</text:span></text:p>
      <text:p text:style-name="P2"><text:span text:style-name="T2">Das</text:span><text:span text:style-name="T1"> Team </text:span><text:span text:style-name="T2">hat sich auf einen Code geeinigt, der</text:span><text:span text:style-name="T1"> zwei Prüfmechanismen </text:span><text:span text:style-name="T2">enthält</text:span><text:span text:style-name="T1">: ein Assert, der sicherstellt, dass keine Target_Spalte in X_train oder X_test verbleibt (alle Target-Spalten werden pro Horizont vollständig aus den Features entfernt, nicht nur die aktuell verwendete), sowie ein Abgleich, dass Trainings- und Testdaten exakt die selben Feature-Spalten besitzen. Ergänzt wurde ein Überlappungs-Check zwischen den Datumsbereichen von Train und Test, da genau diese Überlappung bei</text:span><text:span text:style-name="T2">m herbeiziehen externer Daten</text:span><text:span text:style-name="T1"> ein Problem </text:span><text:span text:style-name="T2">sein kann</text:span><text:span text:style-name="T1">. Der Check bestätigte für die verwendeten CSVs eine saubere Trennung.</text:span></text:p>
      <text:p text:style-name="P5"><text:soft-page-break/><text:span text:style-name="T4">Phase 3: Cross-Validation vor/nach Grid-Search und Ergebnis-Interpretation</text:span></text:p>
      <text:p text:style-name="P2"><text:span text:style-name="T1">Um den Effekt der </text:span><text:span text:style-name="T2">P</text:span><text:span text:style-name="T1">arameter-Suche sichtbar zu machen, wurde </text:span><text:span text:style-name="T5">der</text:span><text:span text:style-name="T1"> Cross-Val</text:span><text:span text:style-name="T2">-Score basierend auf </text:span><text:span text:style-name="T1">RMSE des </text:span><text:span text:style-name="T2">unoptimierten </text:span><text:span text:style-name="T1">Modells </text:span><text:span text:style-name="T5">mit dem </text:span><text:span text:style-name="T1">Score des besten gefundenen Parametersatzes gegenüber</text:span><text:span text:style-name="T5">gestellt</text:span><text:span text:style-name="T1">: </text:span></text:p>
      <table:table table:name="Tabelle1" table:style-name="Tabelle1">
        <table:table-column table:style-name="Tabelle1.A"/>
        <table:table-column table:style-name="Tabelle1.B" table:number-columns-repeated="2"/>
        <table:table-column table:style-name="Tabelle1.D"/>
        <table:table-header-rows>
          <table:table-row table:style-name="Tabelle1.1">
            <table:table-cell table:style-name="Tabelle1.A1" office:value-type="string">
              <text:p text:style-name="P6">Horizont</text:p>
            </table:table-cell>
            <table:table-cell table:style-name="Tabelle1.A1" office:value-type="string">
              <text:p text:style-name="P6">CV-RMSE vorher</text:p>
            </table:table-cell>
            <table:table-cell table:style-name="Tabelle1.A1" office:value-type="string">
              <text:p text:style-name="P6">CV-RMSE nachher</text:p>
            </table:table-cell>
            <table:table-cell table:style-name="Tabelle1.A1" office:value-type="string">
              <text:p text:style-name="P6">Verbesserung</text:p>
            </table:table-cell>
          </table:table-row>
        </table:table-header-rows>
        <table:table-row table:style-name="Tabelle1.1">
          <table:table-cell table:style-name="Tabelle1.A2" office:value-type="string">
            <text:p text:style-name="P7">1d</text:p>
          </table:table-cell>
          <table:table-cell table:style-name="Tabelle1.B2" office:value-type="string">
            <text:p text:style-name="P7">0.9739</text:p>
          </table:table-cell>
          <table:table-cell table:style-name="Tabelle1.C2" office:value-type="string">
            <text:p text:style-name="P7">0.9655</text:p>
          </table:table-cell>
          <table:table-cell table:style-name="Tabelle1.D2" office:value-type="string">
            <text:p text:style-name="P7">+0.0084 (+0.9 %)</text:p>
          </table:table-cell>
        </table:table-row>
        <table:table-row table:style-name="Tabelle1.1">
          <table:table-cell table:style-name="Tabelle1.A3" office:value-type="string">
            <text:p text:style-name="P7">5d</text:p>
          </table:table-cell>
          <table:table-cell table:style-name="Tabelle1.B3" office:value-type="string">
            <text:p text:style-name="P7">2.2061</text:p>
          </table:table-cell>
          <table:table-cell table:style-name="Tabelle1.C3" office:value-type="string">
            <text:p text:style-name="P7">2.1620</text:p>
          </table:table-cell>
          <table:table-cell table:style-name="Tabelle1.D3" office:value-type="string">
            <text:p text:style-name="P7">+0.0440 (+2.0 %)</text:p>
          </table:table-cell>
        </table:table-row>
        <table:table-row table:style-name="Tabelle1.1">
          <table:table-cell table:style-name="Tabelle1.A4" office:value-type="string">
            <text:p text:style-name="P7">30d</text:p>
          </table:table-cell>
          <table:table-cell table:style-name="Tabelle1.B4" office:value-type="string">
            <text:p text:style-name="P7">7.7250</text:p>
          </table:table-cell>
          <table:table-cell table:style-name="Tabelle1.C4" office:value-type="string">
            <text:p text:style-name="P7">5.7196</text:p>
          </table:table-cell>
          <table:table-cell table:style-name="Tabelle1.D4" office:value-type="string">
            <text:p text:style-name="P7">+2.0054 (+26.0 %)</text:p>
          </table:table-cell>
        </table:table-row>
      </table:table>
      <text:p text:style-name="P2"/>
      <text:p text:style-name="P8">Die Verbesserung durch Grid-Search fällt mit steigendem Horizont deutlich größer, wobei bei 30 Tagen auch die Streuung zwischen den drei Folds vor der Suche sehr groß war, ein Hinweis darauf, dass eine einzelne Marktphase im Trainingszeitraum den Score dominiert und die Schätzung mit nur drei Folds entsprechend unsicher ist.</text:p>
      <text:p text:style-name="P8">Die Testergebnisse auf dem Jahr 2019 im Vergleich zur naiven Baseline (Vorhersage = aktueller Preis):</text:p>
      <table:table table:name="Tabelle2" table:style-name="Tabelle2">
        <table:table-column table:style-name="Tabelle2.A"/>
        <table:table-column table:style-name="Tabelle2.B"/>
        <table:table-column table:style-name="Tabelle2.C"/>
        <table:table-column table:style-name="Tabelle2.D"/>
        <table:table-column table:style-name="Tabelle2.E" table:number-columns-repeated="2"/>
        <table:table-header-rows>
          <table:table-row table:style-name="Tabelle2.1">
            <table:table-cell table:style-name="Tabelle2.A1" office:value-type="string">
              <text:p text:style-name="P6">Horizont</text:p>
            </table:table-cell>
            <table:table-cell table:style-name="Tabelle2.A1" office:value-type="string">
              <text:p text:style-name="P6">MAE</text:p>
            </table:table-cell>
            <table:table-cell table:style-name="Tabelle2.A1" office:value-type="string">
              <text:p text:style-name="P6">RMSE</text:p>
            </table:table-cell>
            <table:table-cell table:style-name="Tabelle2.A1" office:value-type="string">
              <text:p text:style-name="P6">R²</text:p>
            </table:table-cell>
            <table:table-cell table:style-name="Tabelle2.A1" office:value-type="string">
              <text:p text:style-name="P6">Naiv-MAE</text:p>
            </table:table-cell>
            <table:table-cell table:style-name="Tabelle2.A1" office:value-type="string">
              <text:p text:style-name="P6">Naiv-RMSE</text:p>
            </table:table-cell>
          </table:table-row>
        </table:table-header-rows>
        <table:table-row table:style-name="Tabelle2.1">
          <table:table-cell table:style-name="Tabelle2.A2" office:value-type="string">
            <text:p text:style-name="P7">1d</text:p>
          </table:table-cell>
          <table:table-cell table:style-name="Tabelle2.B2" office:value-type="string">
            <text:p text:style-name="P7">0.77</text:p>
          </table:table-cell>
          <table:table-cell table:style-name="Tabelle2.C2" office:value-type="string">
            <text:p text:style-name="P7">1.02</text:p>
          </table:table-cell>
          <table:table-cell table:style-name="Tabelle2.D2" office:value-type="string">
            <text:p text:style-name="P7">0.9861</text:p>
          </table:table-cell>
          <table:table-cell table:style-name="Tabelle2.E2" office:value-type="string">
            <text:p text:style-name="P7">0.77</text:p>
          </table:table-cell>
          <table:table-cell table:style-name="Tabelle2.F2" office:value-type="string">
            <text:p text:style-name="P7">1.02</text:p>
          </table:table-cell>
        </table:table-row>
        <table:table-row table:style-name="Tabelle2.1">
          <table:table-cell table:style-name="Tabelle2.A3" office:value-type="string">
            <text:p text:style-name="P7">5d</text:p>
          </table:table-cell>
          <table:table-cell table:style-name="Tabelle2.B3" office:value-type="string">
            <text:p text:style-name="P7">1.62</text:p>
          </table:table-cell>
          <table:table-cell table:style-name="Tabelle2.C3" office:value-type="string">
            <text:p text:style-name="P7">2.22</text:p>
          </table:table-cell>
          <table:table-cell table:style-name="Tabelle2.D3" office:value-type="string">
            <text:p text:style-name="P7">0.9335</text:p>
          </table:table-cell>
          <table:table-cell table:style-name="Tabelle2.E3" office:value-type="string">
            <text:p text:style-name="P7">1.66</text:p>
          </table:table-cell>
          <table:table-cell table:style-name="Tabelle2.F3" office:value-type="string">
            <text:p text:style-name="P7">2.24</text:p>
          </table:table-cell>
        </table:table-row>
        <table:table-row table:style-name="Tabelle2.1">
          <table:table-cell table:style-name="Tabelle2.A4" office:value-type="string">
            <text:p text:style-name="P7">30d</text:p>
          </table:table-cell>
          <table:table-cell table:style-name="Tabelle2.B4" office:value-type="string">
            <text:p text:style-name="P7">4.39</text:p>
          </table:table-cell>
          <table:table-cell table:style-name="Tabelle2.C4" office:value-type="string">
            <text:p text:style-name="P7">5.87</text:p>
          </table:table-cell>
          <table:table-cell table:style-name="Tabelle2.D4" office:value-type="string">
            <text:p text:style-name="P7">0.5209</text:p>
          </table:table-cell>
          <table:table-cell table:style-name="Tabelle2.E4" office:value-type="string">
            <text:p text:style-name="P7">4.32</text:p>
          </table:table-cell>
          <table:table-cell table:style-name="Tabelle2.F4" office:value-type="string">
            <text:p text:style-name="P7">5.61</text:p>
          </table:table-cell>
        </table:table-row>
      </table:table>
      <text:p text:style-name="P2"/>
      <text:p text:style-name="P2"><text:span text:style-name="T6">1-Tage-Horizont: </text:span><text:span text:style-name="T1">MAE und RMSE des Modells sind identisch mit der naiven Baseline (0,77 / 1,02). Das SVR-Modell hat für diesen Horizont im Wesentlichen die Persistenzannahme reproduziert und liefert keinen erkennbaren Mehrwert gegenüber „der Preis morgen entspricht dem Preis heute“.</text:span></text:p>
      <text:p text:style-name="P2"><text:span text:style-name="T6">5-Tage-Horizont: </text:span><text:span text:style-name="T1">Das Modell schlägt die Baseline leicht (MAE 1,62 vs. 1,66; RMSE 2,22 vs. 2,24), ein Vorsprung von rund 2–2,5 %. Spürbar, aber gering.</text:span></text:p>
      <text:p text:style-name="P2"><text:span text:style-name="T6">30-Tage-Horizont: </text:span><text:span text:style-name="T1">Trotz R² von 0,52 liegt das Modell hinter der Baseline zurück (MAE 4,39 vs. 4,32; RMSE 5,87 vs. 5,61). Der Residuen-</text:span><text:span text:style-name="T5">P</text:span><text:span text:style-name="T1">lot zeigt keinen zufälligen Fehler, sondern einen klaren systematischen Bias: von etwa März bis August 2019 überwiegend positive Residuen, danach überwiegend negative. Das Modell hinkt der eigentlichen Trendbewegung hinterher, statt sie vorherzusagen. </text:span><text:span text:style-name="T5">Das ist ein Problem,</text:span><text:span text:style-name="T1"> wenn ein Modell auf einen Zeitraum mit anderer Marktdynamik trainiert wurde, als es später bewerten muss.</text:span></text:p>
      <text:p text:style-name="P8">Zusammengefasst zeigt sich ein für Finanzzeitreihen typisches Muster: Je kürzer der Horizont, desto mehr verhält sich das SVR-Modell wie die naive Baseline (weil kurzfristige Kursänderungen überwiegend Rauschen sind); je länger der Horizont, desto mehr driftet die Vorhersage vom echten Verlauf ab, ohne die Baseline tatsächlich zu schlagen. Nur beim 5-Tage-Horizont ergibt sich ein nachweisbarer, wenn auch kleiner Mehrwert.</text:p>
      <text:p text:style-name="P5"><text:soft-page-break/><text:span text:style-name="T4">Lessons Learned</text:span></text:p>
      <text:p text:style-name="P2"><text:span text:style-name="T6">Ein identischer Score zur Baseline ist selbst ein Ergebnis. </text:span><text:span text:style-name="T1">Dass MAE und RMSE beim 1-Tage-Horizont exakt mit der naiven Baseline übereinstimmen, wirkt zunächst wie ein Zufall, ist aber die erwartbare Konsequenz eines return-basierten Ziels bei sehr kurzfristigen, stark verrauschten Kursänderungen. Ein Modell, das den Score der Baseline nur repliziert statt schlägt, ist kein Fehlschlag der Pipeline, sondern eine ehrliche Aussage über den Informationsgehalt der Features auf dieser Zeitskala.</text:span></text:p>
      <text:p text:style-name="P2"><text:span text:style-name="T6">Cross-Val-Score und Test-Score sind zwei verschiedene Fragen. </text:span><text:span text:style-name="T1">Der CV-RMSE misst, wie gut das Modell innerhalb der Trainingsperiode über mehrere chronologische Folds verallgemeinert. </text:span><text:span text:style-name="T5">D</text:span><text:span text:style-name="T1">er Test-Score misst die Leistung auf einem völlig neuen Jahr (2019). Eine große Lücke zwischen beiden, wie beim 30-Tage-Horizont sichtbar. </text:span><text:span text:style-name="T5">Das scheint ein</text:span><text:span text:style-name="T1"> Hinweis auf eine veränderte Marktdynamik zwischen Trainings- und Testzeitraum </text:span><text:span text:style-name="T5">zu sein</text:span><text:span text:style-name="T1">.</text:span></text:p>
      <text:p text:style-name="P2"><text:span text:style-name="T6">Data-Leak-Checks müssen bei jeder Datenformat-Änderung neu gedacht werden. </text:span><text:span text:style-name="T1">D</text:span><text:span text:style-name="T5">ie v</text:span><text:span text:style-name="T1">orverarbeiteten Team-CSVs hätte fast stillschweigend alle Target-Spalten für andere Horizonte als Features durchgelassen. Erst die explizite Übernahme der Assert-Checks hat das strukturell ausgeschlossen, statt sich auf Sorgfalt beim Spalten </text:span><text:span text:style-name="T5">entfernen</text:span><text:span text:style-name="T1"> zu verlassen.</text:span></text:p>
      <text:p text:style-name="P2"><text:span text:style-name="T6">Mit nur drei CV-Folds sind Verbesserungsangaben in Prozent mit Vorsicht zu lesen. </text:span><text:span text:style-name="T7">Da nur drei CV-Folds verwendet wurden, sollten die prozentualen Verbesserungen vorsichtig bewertet werden. Die großen Unterschiede zwischen den Fold-Scores beim 30-Tage-Horizont zeigen, dass einzelne Ergebnisse zufällig besser ausgefallen sein könnten.</text:span></text:p>
      <text:p text:style-name="P2"><text:span text:style-name="T6">Residuen-</text:span><text:span text:style-name="T8">P</text:span><text:span text:style-name="T6">lots zeigen Bias, den Metriken allein verstecken. </text:span><text:span text:style-name="T7">MAE und RMSE </text:span><text:span text:style-name="T9">machen das </text:span><text:span text:style-name="T7">nicht sichtbar. Erst die zeitliche Darstellung der Residuen machte deutlich, dass die Fehler beim 30-Tage-Horizont nicht zufällig auftreten, sondern über mehrere Monate in dieselbe Richtung gehen.</text:span></text:p>
      <text:p text:style-name="P3">Persönliche Reflexion</text:p>
      <text:p text:style-name="P2"><text:span text:style-name="T6">Größte Leistung. </text:span><text:span text:style-name="T1">Die saubere Trennung zwischen Rückgabewert-Ziel und rekonstruiertem Preis in der TransformedTargetRegressor-Pipeline, kombiniert mit den Data-Leak-Checks beim Wechsel auf das Team-Datenformat. Dadurch ließ sich mit vertretbarem Aufwand umstellen, ohne die Sauberkeit (keine Zukunftsdaten in den Features, keine Überlappung zwischen Train und Test) zu verlieren.</text:span></text:p>
      <text:p text:style-name="P2"><text:span text:style-name="T6">Was war leicht, was war schwer. </text:span><text:span text:style-name="T1">Leicht fiel der technische Pipeline-Aufbau: Imputer, Scaler, PCA und TransformedTargetRegressor sind </text:span><text:span text:style-name="T10">beaknnte</text:span><text:span text:style-name="T1"> sklearn-Bausteine, die sich zügig zusammenstecken ließen. Schwer war die Einordnung der Ergebnisse, insbesondere zu akzeptieren, dass ein exakt mit der Baseline übereinstimmender Score beim 1-Tage-Horizont kein Bug, sondern das plausibelste Ergebnis für diesen Zeithorizont ist, statt weiter an </text:span><text:span text:style-name="T10">P</text:span><text:span text:style-name="T1">arametern zu drehen, in der Hoffnung auf einen deutlicheren Vorsprung.</text:span></text:p>
      <text:p text:style-name="P2"><text:span text:style-name="T6">Habe ich etwas hinzugelernt. </text:span><text:span text:style-name="T1">Ja: den Unterschied zwischen Cross-Val-Score (Trainingsperiode, mehrere Folds) und Test-Score sauber zu trennen und beide Zahlen als sich ergänzende </text:span><text:span text:style-name="T10">Ergebnisse</text:span><text:span text:style-name="T1"> </text:span><text:soft-page-break/><text:span text:style-name="T1">zu lesen. Außerdem, wie stark bei wenigen CV-Folds die Streuung einzelner Folds „Verbesserungen“ verzerren kann.</text:span></text:p>
      <text:p text:style-name="P2"><text:span text:style-name="T6">Was ich wieder so machen würde. </text:span><text:span text:style-name="T1">Die return-basierte Zielgröße statt absoluter Preis-Prognose, weil sie das Modell zwingt, tatsächliche Bewegungen statt nur das Preisniveau zu lernen. Ebenso den direkten </text:span><text:span text:style-name="T10">Vorhersage</text:span><text:span text:style-name="T1">-Ansatz mit einem eigenen Modell pro Horizont statt eines rekursiven Verfahrens, um </text:span><text:span text:style-name="T10">dessen Fehler </text:span><text:span text:style-name="T1">von vornherein auszuschließen.</text:span></text:p>
      <text:p text:style-name="P2"><text:span text:style-name="T6">Was ich anders machen würde. </text:span><text:span text:style-name="T1">Die Lag-Liste </text:span><text:span text:style-name="T10">H</text:span><text:span text:style-name="T1">orizont spezifisch statt einheitlich für alle drei Modelle wählen (z. B. kürzere </text:span><text:span text:style-name="T10">Zeiträume aus der Vergangenheit</text:span><text:span text:style-name="T1"> für den 1-Tage-, längere für den 30-Tage-Horizont), um zu prüfen, ob sich der Rückstand gegenüber der Baseline beim 30-Tage-Horizont dadurch verringern lässt. Außerdem die Anzahl der CV-Folds erhöhen oder zumindest die Fold-Streuung standardmäßig mit ausgeben, um „Verbesserung durch GridSearch“ nicht auf Basis eines einzelnen instabilen Folds zu überschätzen.</text:span></text:p>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0pt" fo:language="de" fo:country="DE" style:letter-kerning="false" style:font-name-asian="NSimSun" style:font-size-asian="10pt" style:language-asian="zh" style:country-asian="CN" style:font-name-complex="Arial1"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Times New Roman" fo:font-size="10pt" fo:language="de" fo:country="DE" style:letter-kerning="false" style:font-name-asian="NSimSun" style:font-size-asian="10pt" style:language-asian="zh" style:country-asian="CN" style:font-name-complex="Arial1"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class="chapter">
      <style:text-properties fo:color="#2e74b5" loext:opacity="100%" fo:font-size="16pt" style:font-size-asian="16pt" style:font-size-complex="16pt"/>
    </style:style>
    <style:style style:name="Heading_20_2" style:display-name="Heading 2" style:family="paragraph" style:parent-style-name="Heading" style:class="chapter">
      <style:text-properties fo:color="#2e74b5" loext:opacity="100%" fo:font-size="13pt" style:font-size-asian="13pt" style:font-size-complex="13pt"/>
    </style:style>
    <style:style style:name="Heading_20_3" style:display-name="Heading 3" style:family="paragraph" style:parent-style-name="Heading" style:class="chapter">
      <style:text-properties fo:color="#1f4d78" loext:opacity="100%" fo:font-size="12pt" style:font-size-asian="12pt" style:font-size-complex="12pt"/>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cm" fo:margin-bottom="0cm" style:contextual-spacing="false" fo:line-height="10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loext:linked-style-name="End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Un-named</meta:initial-creator>
    <meta:editing-cycles>3</meta:editing-cycles>
    <meta:creation-date>2026-07-03T07:51:35.525000000</meta:creation-date>
    <dc:date>2026-07-03T11:54:26.451044200</dc:date>
    <meta:editing-duration>PT7M32S</meta:editing-duration>
    <meta:generator>LibreOffice/26.2.4.2$Windows_X86_64 LibreOffice_project/0229ac93fcf0d7cbc6376066c6f35021cef002dc</meta:generator>
    <meta:document-statistic meta:table-count="2" meta:image-count="0" meta:object-count="0" meta:page-count="4" meta:paragraph-count="69" meta:word-count="1205" meta:character-count="8982" meta:non-whitespace-character-count="7847"/>
  </office:meta>
</office:document-meta>
</file>